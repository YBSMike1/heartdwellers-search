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tiff" manifest:full-path="Pictures/10000000000002A300000180BE3DCAE6.t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size="11pt" style:font-size-asian="11pt" style:font-size-complex="11pt"/>
    </style:style>
    <style:style style:name="P2" style:family="paragraph" style:parent-style-name="Standard" style:master-page-name="Standard">
      <style:paragraph-properties style:page-number="auto"/>
    </style:style>
    <style:style style:name="P3" style:family="paragraph">
      <style:paragraph-properties fo:text-align="center"/>
      <style:text-properties fo:font-size="18pt"/>
    </style:style>
    <style:style style:name="T1" style:family="text">
      <style:text-properties style:font-name="Calibri" fo:font-size="14pt" style:text-underline-style="solid" style:text-underline-width="auto" style:text-underline-color="font-color" fo:font-weight="bold" style:font-size-asian="14pt" style:font-weight-asian="bold" style:font-size-complex="14pt"/>
    </style:style>
    <style:style style:name="T2" style:family="text">
      <style:text-properties style:font-name="Calibri" fo:font-size="11pt" style:font-size-asian="11pt" style:font-size-complex="11pt"/>
    </style:style>
    <style:style style:name="fr1" style:family="graphic" style:parent-style-name="Graphics">
      <style:graphic-properties fo:margin-left="0.1252in" fo:margin-right="0.1252in" fo:margin-top="0in" fo:margin-bottom="0in" style:wrap="parallel" style:number-wrapped-paragraphs="no-limit" style:wrap-contour="true" style:wrap-contour-mode="outsid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0138in" svg:stroke-color="#ffffff"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The Parable of the Guarded Honeybees and the Pilgrim.tiff" draw:style-name="gr1" draw:text-style-name="P3" svg:width="2.0343in" svg:height="1.1567in" svg:x="0in" svg:y="0in">
        <draw:image xlink:href="Pictures/10000000000002A300000180BE3DCAE6.tif" xlink:type="simple" xlink:show="embed" xlink:actuate="onLoad">
          <text:p/>
        </draw:image>
      </draw:frame>
      <text:p text:style-name="P2"><text:span text:style-name="T1">The Parable of The Guarded Honeybees and the Pilgrim</text:span></text:p>
      <text:p text:style-name="Standard"><text:span text:style-name="T2">November 2, 2016</text:span></text:p>
      <text:p text:style-name="P1"/>
      <text:p text:style-name="Standard"><text:span text:style-name="T2">Well, my beloved Heartdwellers. The Lord is so rich in wisdom, and He's continually showing me new things. There is nothing boring about the Christian life!</text:span><draw:frame draw:style-name="fr1" text:anchor-type="char" svg:x="0in" svg:y="0.0083in" svg:width="2.0346in" svg:height="1.1571in" draw:z-index="1"><draw:image xlink:href="Pictures/10000000000002A300000180BE3DCAE6.tif" xlink:type="simple" xlink:show="embed" xlink:actuate="onLoad"/><draw:contour-polygon svg:width="672px" svg:height="381px" svg:viewBox="0 0 672 381" draw:points="9,1 11,2 13,3 13,4 13,5 2,6 2,7 1,8 1,9 1,10 1,11 1,12 1,13 1,14 2,15 1,16 1,17 1,18 1,19 1,20 1,21 1,22 1,23 1,24 2,25 3,26 3,27 3,28 3,29 3,30 3,31 3,32 3,33 2,34 1,35 1,36 1,37 1,38 1,39 1,40 1,41 1,42 1,43 1,44 15,45 15,46 15,47 12,48 10,49 4,50 3,51 3,52 4,53 4,54 5,55 6,56 12,57 11,58 1,59 1,60 1,61 1,62 1,63 1,64 3,65 4,66 4,67 5,68 5,69 5,70 5,71 5,72 5,73 5,74 5,75 4,76 4,77 2,78 1,79 1,80 1,81 1,82 1,83 1,84 1,85 1,86 18,87 18,88 2,89 1,90 1,91 4,92 3,93 1,94 5,95 1,96 1,97 3,98 1,99 1,100 1,101 1,102 1,103 1,104 2,105 4,106 7,107 7,108 7,109 7,110 7,111 7,112 7,113 7,114 7,115 6,116 6,117 5,118 4,119 3,120 2,121 1,122 1,123 1,124 1,125 1,126 1,127 1,128 1,129 1,130 1,131 1,132 1,133 1,134 1,135 1,136 2,137 2,138 2,139 1,140 1,141 1,142 1,143 1,144 3,145 5,146 7,147 8,148 9,149 10,150 10,151 10,152 10,153 11,154 11,155 11,156 11,157 11,158 21,159 3,160 3,161 3,162 4,163 7,164 1,165 1,166 1,167 1,168 1,169 1,170 1,171 1,172 1,173 5,174 1,175 1,176 2,177 4,178 5,179 22,180 4,181 4,182 4,183 4,184 5,185 10,186 1,187 3,188 2,189 2,190 2,191 2,192 3,193 12,194 12,195 11,196 1,197 1,198 1,199 1,200 1,201 2,202 1,203 1,204 2,205 3,206 4,207 5,208 4,209 3,210 6,211 2,212 1,213 1,214 3,215 20,216 22,217 23,218 24,219 1,220 3,221 1,222 2,223 32,224 47,225 47,226 46,227 46,228 47,229 47,230 11,231 12,232 18,233 18,234 20,235 18,236 20,237 53,238 53,239 4,240 2,241 46,242 19,243 19,244 45,245 45,246 7,247 8,248 2,249 3,250 1,251 2,252 5,253 55,254 62,255 45,256 2,257 9,258 11,259 65,260 32,261 31,262 31,263 30,264 1,265 1,266 1,267 1,268 1,269 2,270 8,271 2,272 37,273 33,274 33,275 32,276 32,277 32,278 32,279 33,280 37,281 41,282 33,283 33,284 33,285 33,286 1,287 1,288 1,289 3,290 7,291 9,292 33,293 33,294 15,295 34,296 34,297 35,298 36,299 35,300 35,301 19,302 19,303 38,304 38,305 38,306 38,307 27,308 19,309 19,310 19,311 43,312 22,313 1,314 1,315 1,316 24,317 21,318 20,319 20,320 20,321 21,322 31,323 21,324 32,325 31,326 31,327 31,328 25,329 33,330 36,331 41,332 38,333 38,334 34,335 25,336 25,337 33,338 28,339 34,340 33,341 31,342 76,343 27,344 18,345 14,346 11,347 9,348 14,349 11,350 61,351 64,352 54,353 47,354 53,355 48,356 1,357 1,358 55,359 42,360 55,361 50,362 48,363 48,364 33,365 33,366 33,367 46,368 47,369 47,370 48,371 1,372 1,373 1,374 1,375 1,376 40,377 41,378 42,379 42,380 67,381 87,382 620,382 620,381 620,380 640,379 643,378 647,377 661,376 662,375 669,374 669,373 669,372 665,371 662,370 652,369 652,368 652,367 656,366 666,365 666,364 657,363 657,362 658,361 659,360 662,359 662,358 662,357 663,356 663,355 660,354 661,353 660,352 660,351 668,350 666,349 666,348 666,347 664,346 663,345 657,344 655,343 655,342 654,341 656,340 655,339 657,338 652,337 651,336 651,335 651,334 649,333 651,332 648,331 662,330 661,329 641,328 659,327 656,326 654,325 620,324 673,323 673,322 673,321 673,320 673,319 673,318 673,317 673,316 673,315 673,314 673,313 673,312 673,311 673,310 673,309 673,308 673,307 673,306 673,305 673,304 673,303 673,302 673,301 673,300 673,299 673,298 673,297 673,296 673,295 673,294 673,293 673,292 673,291 673,290 673,289 673,288 673,287 673,286 673,285 673,284 673,283 673,282 673,281 673,280 673,279 673,278 673,277 673,276 673,275 673,274 673,273 673,272 673,271 673,270 673,269 673,268 673,267 673,266 673,265 673,264 673,263 673,262 673,261 673,260 673,259 673,258 673,257 673,256 673,255 673,254 673,253 673,252 673,251 673,250 673,249 673,248 673,247 673,246 673,245 672,244 672,243 672,242 673,241 673,240 673,239 673,238 673,237 673,236 673,235 673,234 673,233 673,232 673,231 673,230 673,229 673,228 673,227 673,226 673,225 673,224 673,223 673,222 673,221 673,220 673,219 673,218 673,217 673,216 673,215 673,214 673,213 673,212 673,211 673,210 673,209 673,208 673,207 673,206 673,205 673,204 673,203 673,202 673,201 673,200 673,199 673,198 673,197 673,196 672,195 672,194 671,193 671,192 670,191 673,190 670,189 669,188 669,187 673,186 673,185 673,184 673,183 673,182 667,181 667,180 666,179 673,178 673,177 673,176 673,175 673,174 673,173 673,172 673,171 673,170 673,169 673,168 673,167 673,166 673,165 673,164 673,163 673,162 673,161 673,160 673,159 673,158 673,157 673,156 673,155 673,154 673,153 673,152 673,151 673,150 673,149 673,148 673,147 673,146 673,145 673,144 673,143 673,142 673,141 673,140 673,139 673,138 673,137 673,136 673,135 673,134 673,133 673,132 673,131 673,130 673,129 673,128 673,127 673,126 673,125 673,124 673,123 673,122 673,121 673,120 673,119 673,118 673,117 645,116 673,115 673,114 673,113 673,112 673,111 673,110 673,109 673,108 673,107 673,106 673,105 673,104 673,103 673,102 673,101 673,100 667,99 673,98 673,97 673,96 645,95 646,94 645,93 645,92 646,91 646,90 646,89 660,88 673,87 673,86 673,85 673,84 673,83 646,82 646,81 646,80 646,79 646,78 673,77 673,76 673,75 673,74 673,73 673,72 673,71 673,70 673,69 673,68 673,67 646,66 673,65 673,64 673,63 673,62 673,61 672,60 673,59 673,58 673,57 673,56 673,55 673,54 673,53 673,52 673,51 673,50 661,49 646,48 646,47 673,46 673,45 673,44 673,43 658,42 659,41 659,40 658,39 655,38 656,37 655,36 655,35 646,34 647,33 651,32 652,31 653,30 652,29 666,28 667,27 667,26 666,25 670,24 670,23 672,22 673,21 673,20 673,19 673,18 673,17 673,16 673,15 673,14 673,13 673,12 673,11 660,10 660,9 673,8 673,7 673,6 673,5 673,4 661,3 670,2 669,1" draw:recreate-on-edit="true"/></draw:frame></text:p>
      <text:p text:style-name="P1"/>
      <text:p text:style-name="Standard"><text:span text:style-name="T2">And I want to share a parable with you today. The Parable of the Guarded Honeybees and the Pilgrim</text:span></text:p>
      <text:p text:style-name="P1"/>
      <text:p text:style-name="P1"><text:bookmark text:name="_GoBack"/></text:p>
      <text:p text:style-name="Standard"><text:span text:style-name="T2">Once there was a dear soul who had become restless with the dreary life she was living and longed to travel and find a way of living that was different from what she had known. <text:s/>The deep forests attracted her sense of adventure, but she was fascinated with the varieties of honeys from the bees all around the world. So she made it a point to visit the their hives in her journeys.</text:span></text:p>
      <text:p text:style-name="P1"/>
      <text:p text:style-name="Standard"><text:span text:style-name="T2">The pilgrimage proved long and little sustenance could be found along the way. <text:s text:c="2"/>When she came across a hive in the forest, desiring to be nourished on the sweet nectar, she devised many ways to get to the honey. <text:s/>She learned about smoking the bees out, speaking to them kindly, or calling them out with sweet strains from the flute. She even waited for the bears to despoil the hive so she could come and eat from the leftovers. <text:s/></text:span></text:p>
      <text:p text:style-name="P1"/>
      <text:p text:style-name="Standard"><text:span text:style-name="T2">There were a few successes in obtaining the nectar…but it would always end in disappointment, when she would get stung several times and her encounter would end with sadness and bitterness, though the honey was at first sweet. <text:s/></text:span></text:p>
      <text:p text:style-name="P1"/>
      <text:p text:style-name="Standard"><text:span text:style-name="T2">This caused her to have a great fear of the hives though the Lord had put a deep desire in her for the nectar. <text:s/></text:span></text:p>
      <text:p text:style-name="P1"/>
      <text:p text:style-name="Standard"><text:span text:style-name="T2">So she went from forest to forest, far and wide through the mountains and plain and even found a hive in the remains of an elk. <text:s/>But as always, it ended in painful stings, and she began to have a great fear of hives. </text:span></text:p>
      <text:p text:style-name="P1"/>
      <text:p text:style-name="Standard"><text:span text:style-name="T2">One day, she met a fellow traveler who was more experienced and wiser than she and he told her of a faraway mountain where the bees were kept by the Master, who taught them to share their honey and keep very careful watch over the hive, so only the choicest pure honey from Heaven would be made. <text:s/></text:span></text:p>
      <text:p text:style-name="P1"/>
      <text:p text:style-name="Standard"><text:span text:style-name="T2">Still, the bees had their own struggles, but they had learned that only the flowers the Master provided produced fine honey, not contaminated by molds and toxic fumes from the world.</text:span></text:p>
      <text:p text:style-name="P1"/>
      <text:p text:style-name="Standard"><text:span text:style-name="T2">So, she set off to this place and finally arriving there, found that it was very heavily guarded. <text:s/>Of course, the Master had seen many who came to steal the hives or destroy them, and they had all experienced heavy losses from careless people who came to take and not consider the needs of the bees. It had taken many years for them to recover from these losses, so the Master kept a close watch over the hives.</text:span></text:p>
      <text:p text:style-name="P1"/>
      <text:p text:style-name="Standard"><text:soft-page-break/><text:span text:style-name="T2">Well she, by this time, was quite afraid of beehives, because she had never visited a hive that would not end up hurting her. <text:s/>So, she assumed this hive was just like them all. <text:s/>She judged that this hive might have great honey, but no hive could be trusted. <text:s/>When she was allowed to enter the gates, she carried with her the fear of the bees, because in her mind they were just like all the others. </text:span></text:p>
      <text:p text:style-name="P1"/>
      <text:p text:style-name="Standard"><text:span text:style-name="T2">She tried to fight these feelings as she camped nearby, but one night after she had tasted some extraordinary honey, she became afraid that the Master would control her, too - so she purposed in her mind to leave quietly without anyone noticing. </text:span></text:p>
      <text:p text:style-name="P1"/>
      <text:p text:style-name="Standard"><text:span text:style-name="T2">Her fear had mastered her. <text:s/>Her desire for the honey the Master had made was great, but she wasn’t in control of her own desire; rather the fear of being stung was in control. <text:s/></text:span></text:p>
      <text:p text:style-name="P1"/>
      <text:p text:style-name="Standard"><text:span text:style-name="T2">So she left without getting a jar of the precious amber honey the Master had prepared just for her.</text:span></text:p>
      <text:p text:style-name="P1"/>
      <text:p text:style-name="Standard"><text:span text:style-name="T2">She continued to go from hive to hive on her pilgrimage, but she always balked when she got close to the honey, because the choicest, pure honeys from Heaven were guarded and that intimidated her. She might lose control…cause that’s how she got stung before. <text:s/></text:span></text:p>
      <text:p text:style-name="P1"/>
      <text:p text:style-name="Standard"><text:span text:style-name="T2">So she wandered the Earth, growing more hungry and frail with predators following her. And she went without the nourishment and protection of the guarded pure honeys for the rest of her days.</text:span></text:p>
      <text:p text:style-name="P1"/>
      <text:p text:style-name="Standard"><text:span text:style-name="T2">So, what is the moral of this story? <text:s/></text:span></text:p>
      <text:p text:style-name="P1"/>
      <text:p text:style-name="Standard"><text:span text:style-name="T2">When we have a fear of anything, it’s usually a survival instinct because we’ve been hurt before. So we cover up and protect ourselves. We avoid all situations where we could be hurt because we don’t want to be controlled by anyone or anything. We don't trust anyone.</text:span></text:p>
      <text:p text:style-name="P1"/>
      <text:p text:style-name="Standard"><text:span text:style-name="T2">This is how Satan gets direction of our lives; this is how HE controls us. <text:s/>Because of our fear, he knows what to make us think so we will avoid something or some place. <text:s/>So when the soul gets close to something that is guarded, authentic and healthy - the enemy insinuates, “They will control you. You don’t want to be controlled do you?” <text:s/>And they're scared away. </text:span></text:p>
      <text:p text:style-name="P1"/>
      <text:p text:style-name="Standard"><text:span text:style-name="T2">But in reality, Satan knows what he stands to lose where the honey is guarded. He knows that there is wisdom and nourishment in the ways of those guarded honeybees. And if that soul begins to trust and truly listen they will be armed against the assaults he wants to make on them until they are thoroughly despoiled of their gifts. </text:span></text:p>
      <text:p text:style-name="P1"/>
      <text:p text:style-name="Standard"><text:span text:style-name="T2">Satan has determined who could be a threat to his kingdom and so he teaches them the way of fear, so fear will easily steer them away from what could have saved them. <text:s/>He also has vowed to isolate them so they will have no further wisdom than their own. <text:s/>He plays on their pride and tells them, “You have no need to listen to them, you already know this. You know what’s important. <text:s/>If you listen to them - they will control you.” </text:span></text:p>
      <text:p text:style-name="P1"/>
      <text:p text:style-name="Standard"><text:span text:style-name="T2">When the soul is convinced of all those things, they are already full; there is no empty space to receive fresh, sweet, pure honey - though they languish for it. <text:s/>So they go on undernourished, </text:span><text:soft-page-break/><text:span text:style-name="T2">making the same mistakes over and over again. <text:s/>Manipulated by fear, they avoid the guarded honey and any wisdom they might share, lest they be controlled by them.</text:span></text:p>
      <text:p text:style-name="P1"/>
      <text:p text:style-name="Standard"><text:span text:style-name="T2">Further, the enemy falsely accuses the innocent guarded bees and if the soul listens, she has opened yet another door for his workers of iniquity to weaken them.</text:span></text:p>
      <text:p text:style-name="P1"/>
      <text:p text:style-name="Standard"><text:span text:style-name="T2">Yet, the irony of it for the soul who is dreadfully afraid of being controlled, is that they are no longer in control of their own lives. <text:s/>All their actions are controlled by the fear of being controlled. And who inspires fear? <text:s/></text:span></text:p>
      <text:p text:style-name="P1"/>
      <text:p text:style-name="Standard"><text:span text:style-name="T2">Satan.</text:span></text:p>
      <text:p text:style-name="P1"/>
      <text:p text:style-name="Standard"><text:span text:style-name="T2">There is good and bad everywhere. There is pure honey from Heaven and contaminated honey with mold from the world. There are nasty stinging bees, killer bees. And bees raised by the Master who swarm in a heart shape while you taste their honey. <text:s/></text:span></text:p>
      <text:p text:style-name="P1"/>
      <text:p text:style-name="Standard"><text:span text:style-name="T2">The only remedy I see for a soul caught in such a pit is humility, which the devils have already destroyed by telling them they don’t need to know anything further. <text:s/></text:span></text:p>
      <text:p text:style-name="P1"/>
      <text:p text:style-name="Standard"><text:span text:style-name="T2">And a teachable spirit is needed as well. <text:s/>What is a teachable spirit? <text:s/>Some have said it means submitting to headship. <text:s/>That’s a perversion meant to control people by yet another form of fear. </text:span></text:p>
      <text:p text:style-name="P1"/>
      <text:p text:style-name="Standard"><text:span text:style-name="T2">Obedience does not mean obeying something in your heart, that you don't feel is right. That's not obedience! If it violates the way the Lord has led you, and it violates your conscience, then you better not do it. And don't allow anyone to accuse you of being disobedient, because that's not the kind of obedience the Lord wants from us. The Lord wants us to be obedient to the Holy Spirit and to Him, and to the known will of God. That's obedience.</text:span></text:p>
      <text:p text:style-name="P1"/>
      <text:p text:style-name="Standard"><text:span text:style-name="T2">But there are times when we fall into error, and we don't always know which voice is the Lord and which voice is the enemy. Because many, many masquerade in the form of Jesus.</text:span></text:p>
      <text:p text:style-name="P1"/>
      <text:p text:style-name="Standard"><text:span text:style-name="T2">A teachable spirit is quick to listen, and slow to speak. <text:s/>A teachable spirit doesn’t constantly defend their ideas. Rather, they listen and compare in silence and allow Holy Spirit to sort out truth from error. <text:s/>A teachable spirit looks for people wiser than themselves and is eager to learn from them. <text:s/>A teachable spirit is hungry for truth, and that hunger will lead them to abandon any way in their lives they discover is false. <text:s/>The truth and only the truth is their standard. <text:s/></text:span></text:p>
      <text:p text:style-name="P1"/>
      <text:p text:style-name="Standard"><text:span text:style-name="T2">That’s how I came to the Lord from the New Age. I explored all the "ism’s" and none of them rang true, until Jesus met me in my darkness and revealed who He was in His brilliant light. <text:s/>Then I had to abandon all my New Age practices. <text:s/>I had to sort through truth and error. That took me YEARS. Years of humble failures and errors, and having to re-learn things that were not the right way.</text:span></text:p>
      <text:p text:style-name="P1"/>
      <text:p text:style-name="Standard"><text:span text:style-name="T2">When I was added to the church I had to sort out men’s ways from God’s ways. <text:s/>But I had been so humbled when the Lord saved me, I was eager to know the difference. </text:span></text:p>
      <text:p text:style-name="P1"/>
      <text:p text:style-name="Standard"><text:soft-page-break/><text:span text:style-name="T2">There is no such thing as a soul who cannot learn. <text:s/>There is only the soul who WILL not learn, because they are convinced they know it all. <text:s/>That’s the saddest state a soul can be in. That's the state I was in in the New Age. That's why I missed Christianity. The Lord had to reveal Himself to me in a brilliant, life-changing event. Much like Saul of Tarsus experienced on the way to Damascus.</text:span></text:p>
      <text:p text:style-name="P1"/>
      <text:p text:style-name="Standard"><text:span text:style-name="T2">Not even in thousands of years will I know all the ways of God. <text:s/>My wisdom is like a grain of sand on the beach. God’s wisdom is like the beaches and the stars of the universe. <text:s/>Woe to me if I ever think I know. God save me from my Pride! And He has - many times. But I still fall into it. I'm a work under construction.</text:span></text:p>
      <text:p text:style-name="P1"/>
      <text:p text:style-name="Standard"><text:span text:style-name="T2">I do not know, and everyday I learn that I know less and less. And that's the only safe place to be.</text:span></text:p>
      <text:p text:style-name="P1"/>
      <text:p text:style-name="Standard"><text:span text:style-name="T2">What I share with you on this channel and with those I correspond with, is simply what God has proven and taught to me. <text:s/>I know nothing independent of what He has shown me. <text:s/>And if I should have the misfortune of having a familiar spirit masquerading as a spirit of prophecy and truth, like was sent to Saul - when God deliberately sent lying spirits into the mouths of his prophets so he would be killed on the battlefield. Oh God, have mercy on my soul and do not turn me over to lying spirits and masquerading demons pretending to be Jesus. </text:span></text:p>
      <text:p text:style-name="P1"/>
      <text:p text:style-name="Standard"><text:span text:style-name="T2">It has happened before, it can happen again. But what saves me is a teachable spirit and the sure knowledge that I do not have the whole truth. And if God chooses to humble me, He can and will, so that I will once again see myself as nothing and Him as everything.</text:span></text:p>
      <text:p text:style-name="P1"/>
      <text:p text:style-name="Standard"><text:span text:style-name="T2">And here I thank Him for He has surrounded me with protection from true, proven, humble, genuinely loving, prophetic people that help me overcome my errors. And God reveals my errors and my faults to them. <text:s/>But without a teachable spirit, they would do me know good at all. <text:s/>Even if Elijah should appear to me, if I have not the retractable grace of humility and a teachable spirit, I would not listen to him but go my own way.</text:span></text:p>
      <text:p text:style-name="P1"/>
      <text:p text:style-name="Standard"><text:span text:style-name="T2">I say retractable grace of humility, because without the Lord’s guarded intervention to keep us humble, I would quickly fall into a worse state of pride than I am presently in. <text:s/>God save us from that!!!</text:span></text:p>
      <text:p text:style-name="P1"/>
      <text:p text:style-name="Standard"><text:span text:style-name="T2">Lord, I appeal to Your mercy. We are all afraid of error and of being controlled. Help us to be humble and teachable, and to know the difference between truth and error. And especially to be willing to submit ourselves to Holy Spirit. Because our wisdom is useless. We need Your wisdom and Your mind every moment of the day, Lord.</text:span></text:p>
      <text:p text:style-name="P1"/>
      <text:p text:style-name="Standard"><text:span text:style-name="T2">So, reveal in us any false way. And help us to receive the Grace to listen to wisdom when it's brought to us, and sent to us from above.</text:span></text:p>
      <text:p text:style-name="Standard"><text:span text:style-name="T2">Amen.</text:span></text:p>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_20_Paragraph_20_Font" style:display-name="Default Paragraph Font"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ministrator</meta:initial-creator>
    <dc:creator>Michael Fisher</dc:creator>
    <meta:editing-cycles>2</meta:editing-cycles>
    <meta:creation-date>2016-11-03T18:27:00</meta:creation-date>
    <dc:date>2016-11-05T14:30:07.12</dc:date>
    <meta:editing-duration>PT1S</meta:editing-duration>
    <meta:generator>OpenOffice/4.1.3$Win32 OpenOffice.org_project/413m1$Build-9783</meta:generator>
    <meta:document-statistic meta:table-count="0" meta:image-count="1" meta:object-count="0" meta:page-count="4" meta:paragraph-count="45" meta:word-count="2089" meta:character-count="1112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